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language="ru" fo:country="RU"/>
    </style:style>
    <style:style style:name="P2" style:family="paragraph" style:parent-style-name="Standard">
      <style:paragraph-properties fo:line-height="150%" fo:text-align="center" style:justify-single-word="false"/>
      <style:text-properties fo:language="ru" fo:country="RU"/>
    </style:style>
    <style:style style:name="P3" style:family="paragraph" style:parent-style-name="Standard">
      <style:paragraph-properties fo:line-height="150%"/>
      <style:text-properties fo:language="ru" fo:country="RU" officeooo:paragraph-rsid="00066acd"/>
    </style:style>
    <style:style style:name="T1" style:family="text">
      <style:text-properties officeooo:rsid="00066acd"/>
    </style:style>
    <style:style style:name="T2" style:family="text">
      <style:text-properties officeooo:rsid="0007f676"/>
    </style:style>
    <style:style style:name="T3" style:family="text">
      <style:text-properties officeooo:rsid="000893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ОГЛАСИЕ НА ОБРАБОТКУ ПЕРСОНАЛЬНЫХ ДАННЫХ</text:p>
      <text:p text:style-name="P1"/>
      <text:p text:style-name="P3"><text:tab/>Настоящим я <text:span text:style-name="T1">(далее Субъект) </text:span>даю согласие <text:span text:style-name="T1">Сариеву Павлу Эдуардовичу </text:span><text:span text:style-name="T3">(далее Оператор)</text:span><text:span text:style-name="T1">, применяющему специальный налоговый режим «Налог на профессиональный доход» (ИНН: 761015286672)</text:span> на обработку моих персональных данных (далее ПД), в соответствии с Федеральным законом от 27.07.2006 № 152-ФЗ «О персональных данных», на следующих условиях:</text:p>
      <text:p text:style-name="P1"><text:tab/><text:span text:style-name="T1">1. </text:span>Перечень ПД, на обработку которых дается согласие: <text:span text:style-name="T1">фамилия,</text:span> <text:span text:style-name="T1">имя, отчество, </text:span>номер телефона, электронная почта, IP-адрес, cookie-файлы и иные метрические данные определяющие поведенческий характер посетителя сайта и собираемые посредством Яндекс.Метрики.</text:p>
      <text:p text:style-name="P1"><text:span text:style-name="T1"><text:tab/>2. </text:span>Цели обработки ПД:</text:p>
      <text:p text:style-name="P1"><text:tab/>- оформление и отправка заявки на <text:span text:style-name="T2">с</text:span>айте <text:a xlink:type="simple" xlink:href="https://akabo.ru/" text:style-name="Internet_20_link" text:visited-style-name="Visited_20_Internet_20_Link"><text:span text:style-name="T2">https://akabo.ru</text:span></text:a><text:span text:style-name="T2"> (далее Сайт) </text:span>в целях получения консультации посредством обратной связи <text:span text:style-name="T3">для</text:span> дальнейшего оказания услуг;</text:p>
      <text:p text:style-name="P1"><text:tab/>- направление Субъекту персональных данных сообщений, уведомлений, запросов,</text:p>
      <text:p text:style-name="P1">ответов, документов, сообщений информационного характера;</text:p>
      <text:p text:style-name="P1"><text:tab/>- заключение и исполнение с Субъектом персональных данных гражданско-правового договора;</text:p>
      <text:p text:style-name="P1"><text:tab/>- <text:span text:style-name="T1">сбор информации о пользовательском опыте Субъекта персональных данных посредством Яндекс.Метрики</text:span>.</text:p>
      <text:p text:style-name="P1"><text:tab/><text:span text:style-name="T1">3. </text:span>Действия с ПД: сбор, систематизация, накопление, хранение, уточнение (обновление,</text:p>
      <text:p text:style-name="P1">изменение), передача (доступ, предоставление), обезличивание, блокирование, удаление,</text:p>
      <text:p text:style-name="P1">уничтожение.</text:p>
      <text:p text:style-name="P1"><text:tab/><text:span text:style-name="T1">4. </text:span>Способ обработки ПД: хранятся исключительно на электронных носителях и</text:p>
      <text:p text:style-name="P1">обрабатываются с использованием автоматизированных систем.</text:p>
      <text:p text:style-name="P1"><text:tab/><text:span text:style-name="T1">5. </text:span>Согласие действует в течении десяти лет или получения от <text:span text:style-name="T1">С</text:span>убъекта персональных</text:p>
      <text:p text:style-name="P1">данных требования о прекращении обработки <text:span text:style-name="T1">ПД, </text:span>отзыва <text:span text:style-name="T1">настоящего С</text:span>огласия или с момента</text:p>
      <text:p text:style-name="P1">прекращения деятельности Оператора.</text:p>
      <text:p text:style-name="P1"><text:tab/><text:span text:style-name="T2">6. </text:span>Согласие может быть отозвано <text:span text:style-name="T2">С</text:span>убъектом ПД <text:span text:style-name="T2">или </text:span>его <text:span text:style-name="T2">законным </text:span>представителем путем</text:p>
      <text:p text:style-name="P1">направления письменного заявления по адресу электронной почты: <text:a xlink:type="simple" xlink:href="mailto:zakaz@akabo.ru" text:style-name="Internet_20_link" text:visited-style-name="Visited_20_Internet_20_Link"><text:span text:style-name="T2">zakaz@akabo.ru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4T15:26:10.824902935</meta:creation-date>
    <dc:date>2026-06-04T15:45:08.361987799</dc:date>
    <meta:editing-duration>PT6M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17" meta:character-count="1817" meta:non-whitespace-character-count="1608"/>
  </office:meta>
</office:document-meta>
</file>